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color="#2a2a2a" loext:opacity="100%" fo:language="en" fo:country="US" style:font-name-asian="Times New Roman1" style:language-asian="pl" style:country-asian="PL" style:font-name-complex="Calibri1"/>
    </style:style>
    <style:style style:name="P3" style:family="paragraph" style:parent-style-name="Standard">
      <style:text-properties style:font-name="Times New Roman" fo:language="en" fo:country="US" style:font-name-asian="Times New Roman1" style:language-asian="pl" style:country-asian="PL" style:font-name-complex="Times New Roman1"/>
    </style:style>
    <style:style style:name="P4" style:family="paragraph" style:parent-style-name="Standard">
      <style:text-properties officeooo:paragraph-rsid="00071ea8"/>
    </style:style>
    <style:style style:name="P5" style:family="paragraph" style:parent-style-name="Standard">
      <style:text-properties officeooo:paragraph-rsid="0008e356"/>
    </style:style>
    <style:style style:name="P6" style:family="paragraph" style:parent-style-name="Standard">
      <style:text-properties officeooo:paragraph-rsid="000ac47b"/>
    </style:style>
    <style:style style:name="P7" style:family="paragraph" style:parent-style-name="Standard">
      <style:text-properties officeooo:paragraph-rsid="000bcf47"/>
    </style:style>
    <style:style style:name="P8"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fo:language="en" fo:country="US"/>
    </style:style>
    <style:style style:name="T2" style:family="text">
      <style:text-properties fo:language="en" fo:country="US" style:font-name-complex="Calibri1"/>
    </style:style>
    <style:style style:name="T3" style:family="text">
      <style:text-properties fo:language="en" fo:country="US" officeooo:rsid="000ac47b" style:font-name-complex="Calibri1"/>
    </style:style>
    <style:style style:name="T4" style:family="text">
      <style:text-properties fo:language="en" fo:country="US" officeooo:rsid="00071ea8"/>
    </style:style>
    <style:style style:name="T5" style:family="text">
      <style:text-properties fo:language="en" fo:country="US" officeooo:rsid="000c8851"/>
    </style:style>
    <style:style style:name="T6" style:family="text">
      <style:text-properties fo:language="en" fo:country="US" officeooo:rsid="0008103b"/>
    </style:style>
    <style:style style:name="T7" style:family="text">
      <style:text-properties fo:language="en" fo:country="US" officeooo:rsid="000e353f"/>
    </style:style>
    <style:style style:name="T8" style:family="text">
      <style:text-properties fo:language="en" fo:country="US" officeooo:rsid="0011361d"/>
    </style:style>
    <style:style style:name="T9" style:family="text">
      <style:text-properties fo:language="en" fo:country="US" officeooo:rsid="0008e356"/>
    </style:style>
    <style:style style:name="T10" style:family="text">
      <style:text-properties fo:language="en" fo:country="US" officeooo:rsid="000ac47b"/>
    </style:style>
    <style:style style:name="T11" style:family="text">
      <style:text-properties fo:language="en" fo:country="US" officeooo:rsid="000bcf47"/>
    </style:style>
    <style:style style:name="T12" style:family="text">
      <style:text-properties fo:color="#2a2a2a" loext:opacity="100%" fo:language="en" fo:country="US" style:font-name-asian="Times New Roman1" style:language-asian="pl" style:country-asian="PL" style:font-name-complex="Calibri1"/>
    </style:style>
    <style:style style:name="T13" style:family="text">
      <style:text-properties fo:color="#2a2a2a" loext:opacity="100%" fo:language="en" fo:country="US" officeooo:rsid="000ac47b" style:font-name-asian="Times New Roman1" style:language-asian="pl" style:country-asian="PL" style:font-name-complex="Calibri1"/>
    </style:style>
    <style:style style:name="T14" style:family="text">
      <style:text-properties fo:color="#2a2a2a" loext:opacity="100%" fo:language="en" fo:country="US" officeooo:rsid="000bcf47" style:font-name-asian="Times New Roman1" style:language-asian="pl" style:country-asian="PL" style:font-name-complex="Calibri1"/>
    </style:style>
    <style:style style:name="T15" style:family="text">
      <style:text-properties fo:color="#2a2a2a" loext:opacity="100%" fo:language="en" fo:country="US" style:font-name-complex="Calibri1"/>
    </style:style>
    <style:style style:name="T16" style:family="text">
      <style:text-properties fo:color="#2a2a2a" loext:opacity="100%" fo:language="en" fo:country="US" officeooo:rsid="000ac47b" style:font-name-complex="Calibri1"/>
    </style:style>
    <style:style style:name="T17" style:family="text">
      <style:text-properties fo:color="#2a2a2a" loext:opacity="100%" fo:language="en" fo:country="US" officeooo:rsid="0011361d" fo:background-color="#ffffff" loext:char-shading-value="0" style:font-name-asian="Times New Roman1" style:language-asian="pl" style:country-asian="PL" style:font-name-complex="Calibri1"/>
    </style:style>
    <style:style style:name="T18" style:family="text">
      <style:text-properties fo:color="#2a2a2a" loext:opacity="100%" style:text-position="super 58%" fo:language="en" fo:country="US" style:font-name-asian="Times New Roman1" style:language-asian="pl" style:country-asian="PL" style:font-name-complex="Calibri1"/>
    </style:style>
    <style:style style:name="T19" style:family="text">
      <style:text-properties fo:color="#0a0a0a" loext:opacity="100%" fo:language="en" fo:country="US" fo:background-color="#ffffff" loext:char-shading-value="0" style:font-name-asian="Times New Roman1" style:language-asian="pl" style:country-asian="PL" style:font-name-complex="Calibri1"/>
    </style:style>
    <style:style style:name="T20" style:family="text">
      <style:text-properties fo:font-variant="small-caps" fo:color="#f10d0c" loext:opacity="100%" style:text-outline="false" style:text-line-through-style="none" style:text-line-through-type="none" style:text-position="0% 100%" style:font-name="Calibri" fo:font-size="10pt" fo:letter-spacing="normal" fo:language="pl" fo:country="PL" fo:font-style="normal" fo:text-shadow="none" style:text-underline-style="none" fo:font-weight="normal" style:text-underline-mode="continuous" style:text-overline-mode="continuous" style:text-line-through-mode="continuous" style:letter-kerning="false" fo:background-color="#ffff00" style:font-name-asian="Calibri1" style:font-size-asian="12pt" style:language-asian="en" style:country-asian="US" style:font-style-asian="normal" style:font-weight-asian="normal" style:font-name-complex="F" style:font-size-complex="12pt" style:language-complex="ar" style:country-complex="SA" style:font-style-complex="normal" style:font-weight-complex="normal" style:text-emphasize="dot below"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Hello</text:span><text:span text:style-name="T1">, </text:span><text:span text:style-name="T1"><office:annotation office:name="__Annotation__714_745571889" loext:resolved="false"><dc:creator>Unknown Author</dc:creator><dc:date>2022-05-09T23:33:10.569194050</dc:date><text:p text:style-name="P8"><text:span text:style-name="T20"><text:s/></text:span><text:span text:style-name="T20">musis się przedstawić xd ?</text:span></text:p><text:p text:style-name="P8"><text:span text:style-name="T20"/></text:p></office:annotation></text:span><text:span text:style-name="T1">my name is </text:span><text:span text:style-name="T4">Natalia.</text:span><office:annotation-end office:name="__Annotation__714_745571889"/><text:span text:style-name="T4"> </text:span><text:span text:style-name="T1">I’d like to </text:span><text:span text:style-name="T5">present to</text:span><text:span text:style-name="T1"> you, a case of a 3-years-old boy, </text:span><text:span text:style-name="T5">with a brief description of </text:span><text:span text:style-name="T1">his illness his illness, </text:span><text:span text:style-name="T5">which still </text:span><text:span text:style-name="T1">remains a fatal disease in low-resource management countries.</text:span></text:p>
      <text:p text:style-name="P1"/>
      <text:p text:style-name="P4"><text:span text:style-name="T6">Lets start by </text:span><text:span text:style-name="T4">outlin</text:span><text:span text:style-name="T6">ing</text:span><text:span text:style-name="T4"> his condition-</text:span><text:span text:style-name="T1"> Peter </text:span><text:span text:style-name="T4">have been</text:span><text:span text:style-name="T1"> admitted to the hospital presenting major complaints of redness, watering and white reflex in the right eye, lingering for the last 2 months. The left eye was within normal limits. He </text:span><text:span text:style-name="T4">had not had </text:span><text:span text:style-name="T1">any past medical history, no history of trauma or eye infection. During his last visit to a GP, he was prescribed some eye drops (local steroid, antibiotic and lubricant) but watering and redness have developed </text:span><text:span text:style-name="T4">further</text:span><text:span text:style-name="T1">. </text:span><text:span text:style-name="T5">In regard to family history,</text:span><text:span text:style-name="T1"> his 15-years-old sister </text:span><text:span text:style-name="T4">was diagnosed </text:span><text:span text:style-name="T1">with thalassemia major, but there </text:span><text:span text:style-name="T4">were</text:span><text:span text:style-name="T1"> no history of similar complaints in the family. Peter </text:span><text:span text:style-name="T4">was</text:span><text:span text:style-name="T1"> born full-term, healthy and achieved his developmental milestones adequate for his age. He didn’t have any typical infections in infancy and doesn’t take any medications. He lives with his parents and his sister in a single-family house in Poznań. His mother </text:span><text:span text:style-name="T4">has not been reporting </text:span><text:span text:style-name="T1">any allergies. The general physical examination showed no abnormalities. </text:span></text:p>
      <text:p text:style-name="P1"/>
      <text:p text:style-name="P5"><text:span text:style-name="T1">Let me stop here for a moment because I would like to extend this point a bit further. Most of you probably catch the big red flag syndrome which is unilateral leukocoria also known as “white pupil syndrome”.</text:span><text:span text:style-name="T7">This may led you to suspect the diagnosis,</text:span><text:span text:style-name="T9"> however</text:span><text:span text:style-name="T7"> y</text:span><text:span text:style-name="T1">ou </text:span><text:span text:style-name="T8">should</text:span><text:span text:style-name="T1"> remember, that there are other common clinical features typical for the disease, such as poorly aligned eyes (professionally called strabismus), red and painful eye (usually due to glaucoma) or poor vision. The illness itself might be rarely asymptomatic for a very long time. </text:span></text:p>
      <text:p text:style-name="P1"/>
      <text:p text:style-name="Standard"><text:span text:style-name="T1">Getting back to the little Peter’s case. </text:span><text:span text:style-name="T9">O</text:span><text:span text:style-name="T1">cular examination </text:span><text:span text:style-name="T9">was conducted:</text:span><text:span text:style-name="T1"> </text:span><text:span text:style-name="T9">f</text:span><text:span text:style-name="T1">ace, lid and eyelashes were normal in both eyes, ocular position and ocular movement of both eyes were full and unrestricted in all directions. Direct ophthalmoscopy showed right eye white reflex and sluggish pupillary reaction to light, the patient was not following the light. Sclera and iris details were normal in both eyes. Afterwards, the B-scan </text:span><text:span text:style-name="T11">ultrasonography</text:span><text:span text:style-name="T1"> was performed which showed two large retinochoroidal mass lesions noted with the following dimensions ??? with the specks of calcification seen posteriorly in the right eye. Next, the doctors carried out the MRI exam which reported a hypointense lesion in the right globe filling the vitreous in T2 and is</text:span><text:span text:style-name="T10">o</text:span><text:span text:style-name="T1">intense signal in T1. No extraocular extension. This suggested retinoblastoma of the right eye with no abnormality in brain parenchyma. The diagnosis was confirmed by a histopathology report, which also showed no invasion of an optic nerve. </text:span></text:p>
      <text:p text:style-name="P1"/>
      <text:p text:style-name="P6"><text:span text:style-name="T3">In conclusion</text:span><text:span text:style-name="T2">- </text:span><text:span text:style-name="T12">Ultrasonography is useful </text:span><text:span text:style-name="T13">tool </text:span><text:span text:style-name="T12">in distinguishing retinoblastoma from non-neoplastic conditions. It is also </text:span><text:span text:style-name="T13">helpful</text:span><text:span text:style-name="T12"> in detecting calcification. MRI may be beneficial in estimating the degree of differentiation of retinoblastoma. Studies show that on T1-weighted images, the tumors usually have a low intensity and are usually difficult to distinguish from surrounding vitreous, </text:span><text:span text:style-name="T13">yet</text:span><text:span text:style-name="T12"> on T2-weighted images, retinoblastoma tumors demonstrate very low intensity compared to </text:span><text:soft-page-break/><text:span text:style-name="T12">vitreous. </text:span><text:span text:style-name="T17">For higher test sensitivity </text:span><text:span text:style-name="T19">eye-cancer specialists would have to perform a biopsy. The </text:span><text:span text:style-name="T12">Blood counts, electrolyte determination as well as urinalysis and liver function tests are useful in excluding other conditions confused with retinoblastoma, which was not relevant in this case due to pathognomonic white-pupil syndrome. Normally differential diagnosis takes into account congenital cataract, retinopathy, toxocariasis, retinal dysplasia or retinal astrocytoma. </text:span></text:p>
      <text:p text:style-name="P2"/>
      <text:p text:style-name="P7"><text:span text:style-name="T13">B</text:span><text:span text:style-name="T12">efore we move on to the treatment, I’d </text:span><text:span text:style-name="T13">like to present </text:span><text:span text:style-name="T12">you the international classification of retinoblastoma. There are five groups of advancement and medical therapy is individualized to the specific patient upon whom it is based. Peter was classified into group D and transported to a clinical center </text:span><text:span text:style-name="T13">with </text:span><text:span text:style-name="T12">higher referral level</text:span><text:span text:style-name="T12"><office:annotation office:name="__Annotation__629_745571889" loext:resolved="false"><dc:creator>Mateusz Macocha</dc:creator><dc:date>2022-05-09T18:12:00</dc:date><meta:creator-initials>MM</meta:creator-initials><text:p><text:span text:style-name="T20">Do wyższego centrum? Nie bardzo wiem jak to rozumieć ani sparafrazowa</text:span></text:p></office:annotation></text:span><text:span text:style-name="T12"> </text:span><office:annotation-end office:name="__Annotation__629_745571889"/><text:span text:style-name="T12">for further management. </text:span><text:span text:style-name="T13">E</text:span><text:span text:style-name="T12">nucleation with an 18mm optic nerve stump was performed, followed by silicon ball implantation. Surgical removal of the tumor has been the standard management of very unfavorable retinoblastoma cases.</text:span><text:span text:style-name="T15"> </text:span><text:span text:style-name="T16">It have been shown</text:span><text:span text:style-name="T15"> that </text:span><text:span text:style-name="T12">the younger the patient is at the time of surgery, the more growth retardation occurs. Postoperatively Peter was prescribed Amoxicillin and reviewed after 2 days. He was also given 1</text:span><text:span text:style-name="T18">st</text:span><text:span text:style-name="T12"> circle of high-dose chemotherapy (1</text:span><text:span text:style-name="T18">st</text:span><text:span text:style-name="T12"> out of 6).</text:span></text:p>
      <text:p text:style-name="P2"/>
      <text:p text:style-name="P7"><text:span text:style-name="T14">In such cases, g</text:span><text:span text:style-name="T12">eneral </text:span><text:span text:style-name="T14">prognosis</text:span><text:span text:style-name="T12"> is bad and the 5-year- survival depends on the extraocular extension. </text:span><text:span text:style-name="T14">Thankfully</text:span><text:span text:style-name="T12">, in Peter’s case since enucleation, there were no recurrence, no distance metastasis, no choroid and optic nerve invasion after 1, 3, 6, 7 and 8 months. He is now under medical supervision and is about to turn 11 this year. </text:span></text:p>
      <text:p text:style-name="P7"><text:span text:style-name="T12">Thank you </text:span><text:span text:style-name="T14">for attention.</text:span></text:p>
      <text:p text:style-name="P2"/>
      <text:p text:style-name="P2"/>
      <text:p text:style-name="P3"/>
      <text:p text:style-name="P3"/>
      <text:p text:style-name="P3"/>
      <text:p text:style-name="P3"/>
      <text:p text:style-name="P3"/>
      <text:p text:style-name="P3"/>
      <text:p text:style-name="P1"/>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pl" fo:country="PL"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fo:language="pl" fo:country="PL"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annotation_20_text" style:display-name="annotation text" style:family="paragraph" style:parent-style-name="Standard" loext:linked-style-name="Tekst_20_komentarza_20_Znak">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Temat_20_komentarza_20_Znak">
      <style:text-properties fo:font-weight="bold" style:font-weight-asian="bold" style:font-weight-complex="bold"/>
    </style:style>
    <style:style style:name="Balloon_20_Text" style:display-name="Balloon Text" style:family="paragraph" style:parent-style-name="Standard" loext:linked-style-name="Tekst_20_dymka_20_Znak">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loext:linked-style-name="annotation_20_text">
      <style:text-properties fo:font-size="10pt" style:font-size-asian="10pt" style:font-size-complex="10pt"/>
    </style:style>
    <style:style style:name="Temat_20_komentarza_20_Znak" style:display-name="Temat komentarza Znak" style:family="text" style:parent-style-name="Tekst_20_komentarza_20_Znak" loext:linked-style-name="annotation_20_subject">
      <style:text-properties fo:font-size="10pt" fo:font-weight="bold" style:font-size-asian="10pt" style:font-weight-asian="bold" style:font-size-complex="10pt" style:font-weight-complex="bold"/>
    </style:style>
    <style:style style:name="Tekst_20_dymka_20_Znak" style:display-name="Tekst dymka Znak"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atalia Gajdzińska</meta:initial-creator>
    <meta:editing-cycles>7</meta:editing-cycles>
    <meta:creation-date>2022-05-08T13:46:00</meta:creation-date>
    <dc:date>2022-05-09T23:42:15.371258533</dc:date>
    <meta:editing-duration>PT2H19M51S</meta:editing-duration>
    <meta:generator>LibreOffice/7.3.2.2$Linux_X86_64 LibreOffice_project/30$Build-2</meta:generator>
    <meta:document-statistic meta:table-count="0" meta:image-count="0" meta:object-count="0" meta:page-count="2" meta:paragraph-count="8" meta:word-count="756" meta:character-count="4874" meta:non-whitespace-character-count="4121"/>
    <meta:user-defined meta:name="AppVersion">16.0000</meta:user-defined>
    <meta:template xlink:type="simple" xlink:actuate="onRequest" xlink:title="Normal.dotm" xlink:href=""/>
  </office:meta>
</office:document-meta>
</file>